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/>
      <text:p text:style-name="Normal"/>
      <text:p text:style-name="Normal">Eu acho a interface do youtube intuitiva e responsiva porque funciona bem em qualquer dispositivo em que é usado</text:p>
      <text:p text:style-name="Normal"/>
      <text:p text:style-name="Normal"><draw:frame draw:style-name="a0" draw:name="drawing" text:anchor-type="as-char" svg:x="0in" svg:y="0in" svg:width="6.26042in" svg:height="3.5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A interface do aplicativo do trensurb é simples de<text:s/>usar,<text:s/>mas é feio e<text:s/>poluído demais visualmente, a fonte escolhida para os textos do aplicativo é ruim demais</text:p>
      <text:p text:style-name="Normal"/>
      <text:p text:style-name="Normal"/>
      <text:p text:style-name="Normal"><draw:frame draw:style-name="a1" draw:name="drawing" text:anchor-type="as-char" svg:x="0in" svg:y="0in" svg:width="3.66667in" svg:height="6.26042in" style:rel-width="scale" style:rel-height="scale"><draw:image xlink:href="media/image2.png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ABRIEL ARTHUR DE CARLI DA ROSA AJALLA</meta:initial-creator>
    <dc:creator>GABRIEL ARTHUR DE CARLI DA ROSA AJALLA</dc:creator>
    <meta:creation-date>2026-06-09T12:33:00Z</meta:creation-date>
    <dc:date>2026-06-09T12:33:00Z</dc:date>
    <meta:template xlink:href="Normal.dotm" xlink:type="simple"/>
    <meta:editing-cycles>1</meta:editing-cycles>
    <meta:editing-duration>PT0S</meta:editing-duration>
    <meta:document-statistic meta:page-count="1" meta:paragraph-count="1" meta:word-count="45" meta:character-count="293" meta:row-count="2" meta:non-whitespace-character-count="249"/>
  </office:meta>
</office:document-meta>
</file>